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00000003008A71ACD6412E00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underline-style="solid" style:text-underline-width="auto" style:text-underline-color="font-color" officeooo:paragraph-rsid="0002f8fd"/>
    </style:style>
    <style:style style:name="P2" style:family="paragraph" style:parent-style-name="Standard">
      <style:paragraph-properties fo:line-height="150%"/>
      <style:text-properties officeooo:rsid="00056c80" officeooo:paragraph-rsid="00056c80"/>
    </style:style>
    <style:style style:name="P3" style:family="paragraph" style:parent-style-name="Standard">
      <style:paragraph-properties fo:line-height="150%"/>
      <style:text-properties officeooo:rsid="00056c80" officeooo:paragraph-rsid="00074f9c"/>
    </style:style>
    <style:style style:name="P4" style:family="paragraph" style:parent-style-name="Standard">
      <style:paragraph-properties fo:line-height="150%"/>
      <style:text-properties officeooo:paragraph-rsid="0002f8fd"/>
    </style:style>
    <style:style style:name="P5" style:family="paragraph" style:parent-style-name="Standard">
      <style:paragraph-properties fo:line-height="150%"/>
      <style:text-properties style:text-underline-style="solid" style:text-underline-width="auto" style:text-underline-color="font-color" officeooo:rsid="0002f8fd" officeooo:paragraph-rsid="0002f8fd"/>
    </style:style>
    <style:style style:name="P6" style:family="paragraph" style:parent-style-name="Standard">
      <style:paragraph-properties fo:line-height="150%"/>
      <style:text-properties officeooo:rsid="0002f8fd" officeooo:paragraph-rsid="0002f8fd"/>
    </style:style>
    <style:style style:name="T1" style:family="text">
      <style:text-properties officeooo:rsid="0002f8fd"/>
    </style:style>
    <style:style style:name="T2" style:family="text">
      <style:text-properties officeooo:rsid="0004534a"/>
    </style:style>
    <style:style style:name="T3" style:family="text">
      <style:text-properties officeooo:rsid="00056c80"/>
    </style:style>
    <style:style style:name="T4" style:family="text">
      <style:text-properties fo:font-style="italic" officeooo:rsid="00056c8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80" style:font-style-asian="normal" style:font-style-complex="normal"/>
    </style:style>
    <style:style style:name="T7" style:family="text">
      <style:text-properties officeooo:rsid="0008c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maine 1 : </text:p>
      <text:p text:style-name="P1"/>
      <text:p text:style-name="P6">- compréhension du travail de Maxime et de son dernier code</text:p>
      <text:p text:style-name="P4">- <text:span text:style-name="T1">utilisation des commandes git </text:span></text:p>
      <text:p text:style-name="P4"><text:tab/>-<text:span text:style-name="T1">relier mon github : </text:span></text:p>
      <text:p text:style-name="P4">git config --global user.name "Nom"<text:line-break/>git config --global user.email "<text:a xlink:type="simple" xlink:href="mailto:email@gmail.com" text:style-name="Internet_20_link" text:visited-style-name="Visited_20_Internet_20_Link">email@gmail.com</text:a>"</text:p>
      <text:p text:style-name="P4">git clone git@github.com:https://github.com/Petitnuagedk/stage-B.git</text:p>
      <text:p text:style-name="P4"><text:tab/>- <text:span text:style-name="T1">se rendre dans un dossier : cd</text:span></text:p>
      <text:p text:style-name="P4"><text:tab/>-<text:span text:style-name="T2">mettre des docs du git dans un dossier : </text:span>git pull</text:p>
      <text:p text:style-name="P4"><text:tab/>- <text:span text:style-name="T1">liste des fichiers dans ce dossier : ls</text:span></text:p>
      <text:p text:style-name="P4"><text:tab/>- <text:span text:style-name="T1">créer un doc dans ce dossier : </text:span><text:span text:style-name="T7">touch</text:span></text:p>
      <text:p text:style-name="P4"><text:tab/>-<text:span text:style-name="T2">fichier modifier : git status</text:span></text:p>
      <text:p text:style-name="P4"><text:tab/>- <text:span text:style-name="T1">ajouter sur dans le dossier pour git : git add . ou git add (nom du dossier)</text:span></text:p>
      <text:p text:style-name="P4"><text:tab/>- <text:span text:style-name="T1">créer un <text:s/>commit : </text:span>git commit -m "<text:span text:style-name="T2">test C++</text:span>"</text:p>
      <text:p text:style-name="P4"><text:tab/>- <text:span text:style-name="T2">mettre sur github : </text:span>git push origin main</text:p>
      <text:p text:style-name="P4"/>
      <text:p text:style-name="P4">-<text:span text:style-name="T2">téléchargement raspberry imager pour flash l os choisi par maxime 32bit lite</text:span></text:p>
      <text:p text:style-name="P4">-<text:span text:style-name="T2">configuration de la raspberry maitre Pi3 :</text:span></text:p>
      <text:p text:style-name="P4"><text:tab/>- <text:span text:style-name="T3">cd /boot (car code ranger dedans sur la carte sd)</text:span></text:p>
      <text:p text:style-name="P4"><text:tab/>- <text:span text:style-name="T3">le code se stock dans /boot /firmware genéralement</text:span></text:p>
      <text:p text:style-name="P4"><text:tab/>- <text:span text:style-name="T3">commande pour le retrouver : find </text:span><text:span text:style-name="T4">boot -name « *.sh » 2&gt;</text:span><text:span text:style-name="T6">dev/null</text:span></text:p>
      <text:p text:style-name="P4"><text:tab/>- <text:span text:style-name="T1">liste des fichers executable -</text:span><text:span text:style-name="T3">x pour vérifier que le code le soit bien </text:span><text:span text:style-name="T1">: ls -l</text:span></text:p>
      <text:p text:style-name="P4"><text:tab/><text:span text:style-name="T3">(sinon faire sudo chmod +x /boot /firmware /CodeMaxime.sh)</text:span></text:p>
      <text:p text:style-name="P4"><text:tab/>-<text:span text:style-name="T3">deplacer le script car firmware pas bon pour executer : sudo mv /boot /firmware <text:tab/>/CodeMaxime.sh /usr /</text:span><text:span text:style-name="T6">local /bin</text:span></text:p>
      <text:p text:style-name="P4"><text:tab/>- <text:span text:style-name="T3">connexion de la raspberry au wifi par ethernet et passer le proxy de l onera :</text:span></text:p>
      <text:p text:style-name="P4"><text:tab/><text:tab/>echo "nameserver 134.212.90.6" | sudo tee /etc/resolv.conf</text:p>
      <text:p text:style-name="P4"><text:tab/><text:tab/>export http_proxy="http://proxy.onecert.fr:8080"</text:p>
      <text:p text:style-name="P4"><text:tab/><text:tab/>export https_proxy="http://proxy.onecert.fr:8080"</text:p>
      <text:p text:style-name="P4"><text:tab/><text:tab/>echo 'Acquire::http::Proxy "http://proxy.onecert.fr:8080";' | sudo tee <text:tab/><text:tab/><text:tab/><text:tab/>/etc/apt/apt.conf.d/99temp_proxy</text:p>
      <text:p text:style-name="P2"><text:tab/><text:tab/>(J ARRIVE TJR PAS A LE FAIRE TJR DES ERREUR)</text:p>
      <text:p text:style-name="P2"><draw:frame draw:style-name="fr1" draw:name="Image1" text:anchor-type="char" svg:x="3.145cm" svg:y="0.275cm" svg:width="9.387cm" svg:height="7.04cm" draw:z-index="0"><draw:image xlink:href="Pictures/1000020100000400000003008A71ACD6412E0024.png" xlink:type="simple" xlink:show="embed" xlink:actuate="onLoad" loext:mime-type="image/png"/></draw:frame><text:soft-page-break/></text:p>
      <text:p text:style-name="P2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executer le script : sudo /usr /<text:span text:style-name="T5">local/bin /CodeMaxime.sh 1 (pour la premiere ip)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6-06-05T15:50:05.747330474</meta:creation-date>
    <dc:date>2026-06-05T16:37:23.131825262</dc:date>
    <meta:editing-duration>PT4M2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271" meta:character-count="1667" meta:non-whitespace-character-count="1391"/>
  </office:meta>
</office:document-meta>
</file>